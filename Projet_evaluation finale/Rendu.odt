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eb3b9" officeooo:paragraph-rsid="001eb3b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eea6b" officeooo:paragraph-rsid="001eea6b" style:font-size-asian="18pt" style:font-weight-asian="bold" style:font-size-complex="18pt" style:font-weight-complex="bold"/>
    </style:style>
    <style:style style:name="P3" style:family="paragraph" style:parent-style-name="Standard">
      <style:paragraph-properties fo:text-align="start" style:justify-single-word="false"/>
      <style:text-properties officeooo:paragraph-rsid="001eea6b"/>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officeooo:rsid="001eb3b9" officeooo:paragraph-rsid="001eb3b9" style:font-size-asian="15pt" style:font-weight-asian="bold" style:font-size-complex="15pt" style:font-weight-complex="bold"/>
    </style:style>
    <style:style style:name="P5" style:family="paragraph" style:parent-style-name="Standard">
      <style:paragraph-properties fo:text-align="start" style:justify-single-word="false"/>
      <style:text-properties officeooo:rsid="001eb3b9" officeooo:paragraph-rsid="001eb3b9"/>
    </style:style>
    <style:style style:name="P6" style:family="paragraph" style:parent-style-name="Standard">
      <style:paragraph-properties fo:text-align="start" style:justify-single-word="false"/>
      <style:text-properties officeooo:rsid="0023da49" officeooo:paragraph-rsid="0023da49"/>
    </style:style>
    <style:style style:name="P7" style:family="paragraph" style:parent-style-name="Standard">
      <style:paragraph-properties fo:text-align="start" style:justify-single-word="false"/>
      <style:text-properties fo:font-weight="bold" officeooo:rsid="001eb3b9" officeooo:paragraph-rsid="001eb3b9" style:font-weight-asian="bold" style:font-weight-complex="bold"/>
    </style:style>
    <style:style style:name="P8" style:family="paragraph" style:parent-style-name="Standard">
      <style:paragraph-properties fo:text-align="start" style:justify-single-word="false"/>
      <style:text-properties officeooo:paragraph-rsid="001eb3b9"/>
    </style:style>
    <style:style style:name="T1" style:family="text">
      <style:text-properties officeooo:rsid="002da85f"/>
    </style:style>
    <style:style style:name="T2" style:family="text">
      <style:text-properties officeooo:rsid="002d1abd"/>
    </style:style>
    <style:style style:name="T3" style:family="text">
      <style:text-properties officeooo:rsid="002d8480"/>
    </style:style>
    <style:style style:name="T4" style:family="text">
      <style:text-properties officeooo:rsid="0026d0b1"/>
    </style:style>
    <style:style style:name="T5" style:family="text">
      <style:text-properties officeooo:rsid="002892d1"/>
    </style:style>
    <style:style style:name="T6" style:family="text">
      <style:text-properties officeooo:rsid="001eb3b9"/>
    </style:style>
    <style:style style:name="T7" style:family="text">
      <style:text-properties officeooo:rsid="002b8f0a"/>
    </style:style>
    <style:style style:name="T8" style:family="text">
      <style:text-properties officeooo:rsid="0028a6a7"/>
    </style:style>
    <style:style style:name="T9" style:family="text">
      <style:text-properties officeooo:rsid="0029aa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oir Maison Haskell</text:p>
      <text:p text:style-name="P2">Sofiane ALLA <text:span text:style-name="T1">et </text:span><text:span text:style-name="T2">un autre étudiant </text:span><text:span text:style-name="T3">qui se reconnaitra et dont je préfère ne pas divulguer le nom par principe</text:span></text:p>
      <text:p text:style-name="P3"/>
      <text:p text:style-name="P3"/>
      <text:p text:style-name="P4">PARTIE 1</text:p>
      <text:p text:style-name="P5"/>
      <text:p text:style-name="P6">Il y avait seulement des fonctions à définir (voir fichier <text:span text:style-name="T4">DM_Haskell</text:span>.hs).</text:p>
      <text:p text:style-name="P5"/>
      <text:p text:style-name="P5"/>
      <text:p text:style-name="P4">PARTIE 2</text:p>
      <text:p text:style-name="P5"/>
      <text:p text:style-name="P7">2.1 Préliminaires</text:p>
      <text:p text:style-name="P5"/>
      <text:p text:style-name="P5">a) En prenant comme état initial l'état e, on retrouvera dans les descendants des descendants (en appliquant la fonction successeurs deux fois) notre état initial e.</text:p>
      <text:p text:style-name="P5"/>
      <text:p text:style-name="P5">e = [(2,2),(1,1),(2,1),(3,1),(2,3),(3,2),(3,3),(1,3),(1,2)]</text:p>
      <text:p text:style-name="P5"/>
      <text:p text:style-name="P5">successeurs e ==&gt; [[(2,1),(1,1),(2,2),(3,1),(2,3),(3,2),(3,3),(1,3),(1,2)],</text:p>
      <text:p text:style-name="P5"><text:tab/><text:tab/> <text:s text:c="2"/>[(2,3),(1,1),(2,1),(3,1),(2,2),(3,2),(3,3),(1,3),(1,2)],</text:p>
      <text:p text:style-name="P5"><text:tab/><text:tab/> <text:s text:c="2"/>[(3,2),(1,1),(2,1),(3,1),(2,3),(2,2),(3,3),(1,3),(1,2)],</text:p>
      <text:p text:style-name="P5"><text:tab/><text:tab/> <text:s text:c="2"/>[(1,2),(1,1),(2,1),(3,1),(2,3),(3,2),(3,3),(1,3),(2,2)]]</text:p>
      <text:p text:style-name="P5"><text:tab/><text:tab/> <text:s text:c="2"/></text:p>
      <text:p text:style-name="P5">successeurs(successeurs e!!0) ==&gt; [[(1,1),(2,1),(2,2),(3,1),(2,3),(3,2),(3,3),(1,3),(1,2)],</text:p>
      <text:p text:style-name="P5"><text:tab/><text:tab/><text:tab/><text:tab/> <text:s text:c="3"/>[(2,2),(1,1),(2,1),(3,1),(2,3),(3,2),(3,3),(1,3),(1,2)],</text:p>
      <text:p text:style-name="P5"><text:tab/><text:tab/><text:tab/><text:tab/> <text:s text:c="3"/>[(3,1),(1,1),(2,2),(2,1),(2,3),(3,2),(3,3),(1,3),(1,2)]]</text:p>
      <text:p text:style-name="P5"/>
      <text:p text:style-name="P5">On retrouve l’état initial e (deuxième descendant du premier descendant de e dans notre exemple). </text:p>
      <text:p text:style-name="P5">Si on avait pris le deuxième, troisième ou quatrième descendant de e, on aurait retrouvé notre état initial en réappliquant la fonction successeurs.</text:p>
      <text:p text:style-name="P5"/>
      <text:p text:style-name="P5">b) Si l’on ne prend pas garde à ce phénomène, il y a un risque que l'on repasse par un état courant sur lequel nous sommes déjà passé <text:span text:style-name="T5">et donc on créerai une boucle inutile.</text:span></text:p>
      <text:p text:style-name="P5"/>
      <text:p text:style-name="P7">2.2 Étude du parcours en largeur (Breadth First Search)</text:p>
      <text:p text:style-name="P5"/>
      <text:p text:style-name="P5">a) Le premier paramètre de bfsSolv correspond à une liste d'états.</text:p>
      <text:p text:style-name="P5"/>
      <text:p text:style-name="P5">b) Le second paramètre « visited » nous permet de garder en mémoire tous les états ayant déjà été visités.</text:p>
      <text:p text:style-name="P5"/>
      <text:p text:style-name="P5">c) On fait un retournement de la liste dans la première équation de bfsSolv pour tout simplement nous retourner dans l'ordre les étapes nécessaires (on retire les étapes identiques car il est inutile de passer 2 fois par le même état) de la résolution de notre état initial vers notre état final.</text:p>
      <text:p text:style-name="P5"/>
      <text:p text:style-name="P5">d) Dans la liste (bfs s), son premier élément sera s et son dernier élément sera ef. </text:p>
      <text:p text:style-name="P5">La longueur de cette liste représente le nombre d'état que renvoie successeurs s, puis successeurs (successeurs s!!0), puis successeurs (successeurs s!!1), ... jusqu'à ce qu'on obtiennent l'état final.</text:p>
      <text:p text:style-name="P5"/>
      <text:p text:style-name="P5"><text:soft-page-break/>e) La fonction (add_Bfs xs ys) prends deux liste d'états en paramètre, inverses leur ordre puis les concatènes. Pour chaque successeur d'un sommet s, on vérifie s'il a déjà été visité, si c'est le cas on le supprime.</text:p>
      <text:p text:style-name="P5">On rappelle que : FIFO → file et LIFO → pile, ainsi il s'agit-il d’une gestion de type FIFO car on effectue un parcours en largeur.</text:p>
      <text:p text:style-name="P5"/>
      <text:p text:style-name="P7">2.3 Parcours en profondeur (Depth First Search)</text:p>
      <text:p text:style-name="P8"/>
      <text:p text:style-name="P8"><text:span text:style-name="T6">On rappel que : FIFO → file et LIFO → pile, ainsi il s'agit-il d’une gestion de type LIFO car on effectue un parcours en </text:span><text:span text:style-name="T7">profondeur</text:span><text:span text:style-name="T6">.</text:span></text:p>
      <text:p text:style-name="P5"/>
      <text:p text:style-name="P5"/>
      <text:p text:style-name="P4">PARTIE 3</text:p>
      <text:p text:style-name="P5"/>
      <text:p text:style-name="P7">3.3 Déterminer le chemin allant d’un état initial s a l’état final ef en utilisant un parcours en largeur</text:p>
      <text:p text:style-name="P5"/>
      <text:p text:style-name="P5">a) bfsPath <text:span text:style-name="T8">prend, en entrée, un état et renvoie une liste d’états qui correspondent au chemin à parcourir pour résoudre le Taquin en utilisant </text:span>bfsSolv2.</text:p>
      <text:p text:style-name="P5"/>
      <text:p text:style-name="P5">b) bfsSolv2 <text:span text:style-name="T8">prend, en entrée, </text:span><text:span text:style-name="T9">deux listes de couple d’états qui sont des couples (père, fils)</text:span><text:span text:style-name="T8"> et renvoie une liste d’états qui correspondent au chemin à parcourir pour résoudre le Taqu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4-26T14:53:09.708629829</meta:creation-date>
    <dc:date>2026-05-14T13:43:42.371950000</dc:date>
    <meta:editing-duration>PT1H6M16S</meta:editing-duration>
    <meta:editing-cycles>17</meta:editing-cycles>
    <meta:generator>LibreOffice/25.8.1.1$MacOSX_AARCH64 LibreOffice_project/54047653041915e595ad4e45cccea684809c77b5</meta:generator>
    <meta:document-statistic meta:table-count="0" meta:image-count="0" meta:object-count="0" meta:page-count="2" meta:paragraph-count="33" meta:word-count="466" meta:character-count="3147" meta:non-whitespace-character-count="2675"/>
  </office:meta>
</office:document-meta>
</file>